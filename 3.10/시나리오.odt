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F000002C58CA467E37B2F1BD5.png" manifest:media-type="image/png"/>
  <manifest:file-entry manifest:full-path="Pictures/10000000000003DC000001FB6EFC2571D2A0E6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Standard">
      <style:text-properties fo:font-size="11pt" officeooo:paragraph-rsid="001d136c" style:font-size-asian="11pt" style:font-size-complex="11pt"/>
    </style:style>
    <style:style style:name="P2" style:family="paragraph" style:parent-style-name="Standard">
      <style:text-properties fo:font-size="11pt" officeooo:paragraph-rsid="00207a9b" style:font-size-asian="11pt" style:font-size-complex="11pt"/>
    </style:style>
    <style:style style:name="P3" style:family="paragraph" style:parent-style-name="Standard">
      <style:text-properties fo:font-size="11pt" officeooo:paragraph-rsid="001d136c" style:font-size-asian="11pt" style:font-size-complex="11pt"/>
    </style:style>
    <style:style style:name="P4" style:family="paragraph" style:parent-style-name="Standard">
      <style:text-properties fo:font-size="11pt" officeooo:paragraph-rsid="0020d18d" style:font-size-asian="11pt" style:font-size-complex="11pt"/>
    </style:style>
    <style:style style:name="P5" style:family="paragraph" style:parent-style-name="Standard">
      <style:text-properties officeooo:rsid="001d136c" officeooo:paragraph-rsid="00207a9b"/>
    </style:style>
    <style:style style:name="P6" style:family="paragraph" style:parent-style-name="Standard">
      <style:text-properties officeooo:rsid="001d136c" officeooo:paragraph-rsid="0020d18d"/>
    </style:style>
    <style:style style:name="T1" style:family="text">
      <style:text-properties officeooo:rsid="001d136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officeooo:rsid="001e2b5a"/>
    </style:style>
    <style:style style:name="T7" style:family="text">
      <style:text-properties fo:font-weight="bold" officeooo:rsid="001d136c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07a9b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d136c" style:font-size-asian="15pt" style:font-weight-asian="bold" style:font-size-complex="15pt" style:font-weight-complex="bold"/>
    </style:style>
    <style:style style:name="T12" style:family="text">
      <style:text-properties fo:font-size="20pt" fo:font-weight="bold" officeooo:rsid="001d136c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딥러닝 기반 아기 울음소리 분류기</text:span><text:span text:style-name="T2"><text:line-break/><text:line-break/></text:span><text:span text:style-name="T8">· 목적</text:span><text:span text:style-name="T2"> </text:span></text:p>
      <text:p text:style-name="P5"><text:span text:style-name="T4">의사표현이 불가능한 영유아들의 울음소리를 딥러닝 모델로 실시간 분석하여 양육자에 아기의 구체적인 상태를 전달한다.</text:span></text:p>
      <text:p text:style-name="P5"><text:span text:style-name="T4"/></text:p>
      <text:p text:style-name="P5"><text:span text:style-name="T8">· 방법</text:span></text:p>
      <text:p text:style-name="P2"><text:span text:style-name="T1">영유아들의 울음소리의 의도는 크게 5개로 구분 한다. <text:line-break/>1. 배고플 때 <text:s text:c="2"/>2. 졸릴 때 <text:s text:c="2"/>3. 불편할 때 <text:s text:c="2"/>4. 복통 <text:s text:c="2"/>5. 트림하고 싶을 때</text:span></text:p>
      <text:p text:style-name="P2"/>
      <text:p text:style-name="P2"><draw:frame draw:style-name="fr1" draw:name="이미지2" text:anchor-type="char" svg:width="13.529cm" svg:height="13.051cm" draw:z-index="1"><draw:image xlink:href="Pictures/10000000000002DF000002C58CA467E37B2F1BD5.png" xlink:type="simple" xlink:show="embed" xlink:actuate="onLoad" draw:mime-type="image/png"/></draw:frame><text:span text:style-name="T1"><text:line-break/>‘호</text:span>주의 프리실라 던스턴이 전 세계 모든 아기들은 태어난 직후 생존을 위해 5가지 공통된 반사적 소리를 낸다’라고 주장하는 이론으로 저 <text:span text:style-name="T1">5가지를 던스턴 베이비 랭귀지라고 한다.<text:line-break/><text:line-break/>부모들의 경험과 조치 후 결과를 바탕으로 해당 데이터의 라벨링이 진행된다.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8">· 실제 연구</text:span></text:p>
      <text:p text:style-name="P1"/>
      <text:p text:style-name="P1"/>
      <text:p text:style-name="P4">실제로 <text:span text:style-name="T6">ios앱으로 만드는 소스를 제공해주는 사이트가 있었다.</text:span></text:p>
      <text:p text:style-name="P4">모델, 훈련<text:span text:style-name="T6"><text:line-break/><text:line-break/><text:line-break/>우리 프로젝트의 최종 목표도 추가로 아기의 위험행동을 감지하는 시스템도 넣어 카메라로 아기가 요</text:span><draw:frame draw:style-name="fr2" draw:name="이미지1" text:anchor-type="char" svg:x="0.106cm" svg:y="0.827cm" svg:width="17cm" svg:height="8.722cm" draw:z-index="0"><draw:image xlink:href="Pictures/10000000000003DC000001FB6EFC2571D2A0E62D.png" xlink:type="simple" xlink:show="embed" xlink:actuate="onLoad" draw:mime-type="image/png"/></draw:frame><text:span text:style-name="T6">람이나 특정 구역을 벗어나려는 듯한 위험한 행동도 감지하고 아기 울음소리 분류기를 직접 구축하여 아기가 울 때 실시간으로 동작해 울음소리도 분류하여 알려주는 어플을 만들려고 한다.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12pt" fo:language="en" fo:country="US" style:letter-kerning="true" style:font-name-asian="Noto Sans KR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Noto Sans KR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3T12:20:56.507000000</meta:creation-date>
    <dc:date>2026-03-09T20:51:25.195000000</dc:date>
    <meta:editing-duration>PT5H43M18S</meta:editing-duration>
    <meta:editing-cycles>5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8" meta:word-count="380" meta:character-count="522" meta:non-whitespace-character-count="387"/>
  </office:meta>
</office:document-meta>
</file>